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weight="bold" officeooo:rsid="000776ec" officeooo:paragraph-rsid="000776ec" style:font-weight-asian="bold" style:font-weight-complex="bold"/>
    </style:style>
    <style:style style:name="P2" style:family="paragraph" style:parent-style-name="Standard">
      <style:text-properties style:font-name="Calibri" fo:font-weight="normal" officeooo:rsid="000776ec" officeooo:paragraph-rsid="000776ec" style:font-weight-asian="normal" style:font-weight-complex="normal"/>
    </style:style>
    <style:style style:name="P3" style:family="paragraph" style:parent-style-name="Standard">
      <style:text-properties style:font-name="Calibri" fo:font-weight="normal" officeooo:rsid="0008ab41" officeooo:paragraph-rsid="0008ab41" style:font-weight-asian="normal" style:font-weight-complex="normal"/>
    </style:style>
    <style:style style:name="P4" style:family="paragraph" style:parent-style-name="Standard">
      <style:text-properties style:font-name="Calibri" fo:font-weight="bold" officeooo:rsid="000776ec" officeooo:paragraph-rsid="0008ab41" style:font-weight-asian="bold" style:font-weight-complex="bold"/>
    </style:style>
    <style:style style:name="P5" style:family="paragraph" style:parent-style-name="Standard">
      <style:text-properties style:font-name="Calibri" fo:font-weight="normal" officeooo:rsid="000776ec" officeooo:paragraph-rsid="0008ab41" style:font-weight-asian="normal" style:font-weight-complex="normal"/>
    </style:style>
    <style:style style:name="T1" style:family="text">
      <style:text-properties officeooo:rsid="0008ab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punk Content/Trigger Warning Guide</text:p>
      <text:p text:style-name="P1"/>
      <text:p text:style-name="P2">When Sex Work is mentioned, it is not to Judge Sex Work or Sex Workers. In the Cyberpunk Universe it is always linked with degrading and objectifying (The Dolls Chip or plain the „using“ of another human beeing) the Sex Worker. That can be disturbing or triggering hence the mention.</text:p>
      <text:p text:style-name="P1"/>
      <text:p text:style-name="P1">Quest: The Rescue</text:p>
      <text:p text:style-name="P2">CW: Gore, Nudity, Organ Harvesting</text:p>
      <text:p text:style-name="P2">Describtion:</text:p>
      <text:p text:style-name="P1"/>
      <text:p text:style-name="P1">Quest: Automatic Love</text:p>
      <text:p text:style-name="P2">CW: Sex Work, Human Trafficing, <text:s/>Mention of SA</text:p>
      <text:p text:style-name="P2">Describtion:</text:p>
      <text:p text:style-name="P2">Notes: Kill Woodman, as he deserves it</text:p>
      <text:p text:style-name="P2"/>
      <text:p text:style-name="P1">Quest: <text:span text:style-name="T1">The Space in Between</text:span></text:p>
      <text:p text:style-name="P2">CW: <text:span text:style-name="T1">Human Trafficing</text:span></text:p>
      <text:p text:style-name="P2">Describtion:</text:p>
      <text:p text:style-name="P3">Notes: You can kill fingers after knocking him out, stand near his desk in the operating room and shoot through the open door</text:p>
      <text:p text:style-name="P2"/>
      <text:p text:style-name="P1">Quest: <text:span text:style-name="T1">Disasterpiece</text:span></text:p>
      <text:p text:style-name="P2">CW: <text:span text:style-name="T1">Torture, Gore, Human Trafficing, Rape</text:span></text:p>
      <text:p text:style-name="P2">Describtion:</text:p>
      <text:p text:style-name="P2"/>
      <text:p text:style-name="P1">Quest: <text:span text:style-name="T1">Both Sides, Now</text:span></text:p>
      <text:p text:style-name="P2">CW: <text:span text:style-name="T1">Suicide</text:span></text:p>
      <text:p text:style-name="P2">Describtion:</text:p>
      <text:p text:style-name="P2"/>
      <text:p text:style-name="P1">Quest: </text:p>
      <text:p text:style-name="P2">CW: </text:p>
      <text:p text:style-name="P2">Describtion:</text:p>
      <text:p text:style-name="P2"/>
      <text:p text:style-name="P1">Quest: </text:p>
      <text:p text:style-name="P2">CW: </text:p>
      <text:p text:style-name="P2">Describtion:</text:p>
      <text:p text:style-name="P2"/>
      <text:p text:style-name="P1">Quest: </text:p>
      <text:p text:style-name="P2">CW: </text:p>
      <text:p text:style-name="P2">Describtion:</text:p>
      <text:p text:style-name="P2"/>
      <text:p text:style-name="P4">Quest: Monster Hunt</text:p>
      <text:p text:style-name="P5">CW: SA, Rape, Gore, Human Trafficing</text:p>
      <text:p text:style-name="P5">Describtion:</text:p>
      <text:p text:style-name="P5"/>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49:51.801945300</meta:creation-date>
    <dc:date>2026-05-19T14:05:57.170420800</dc:date>
    <meta:editing-duration>PT5M51S</meta:editing-duration>
    <meta:editing-cycles>1</meta:editing-cycles>
    <meta:document-statistic meta:table-count="0" meta:image-count="0" meta:object-count="0" meta:page-count="1" meta:paragraph-count="31" meta:word-count="149" meta:character-count="940" meta:non-whitespace-character-count="815"/>
    <meta:generator>LibreOffice/25.8.5.2$Windows_X86_64 LibreOffice_project/9c8b85f387cc00a89945a79c9e6239f32e450ac2</meta:generator>
  </office:meta>
</office:document-meta>
</file>